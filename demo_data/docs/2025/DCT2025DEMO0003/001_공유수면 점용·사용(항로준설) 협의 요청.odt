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p>해양지방해양수산청</text:p>
      <text:p>수신 해양시장</text:p>
      <text:p>제목 공유수면 점용·사용(항로준설) 협의 요청</text:p>
      <text:p>1. 푸른항 항로준설 공사와 관련하여 아래와 같이 공유수면 점용·사용 협의를 요청합니다.</text:p>
      <text:p>가. 신청인 : 푸른항만공사</text:p>
      <text:p>나. 위 치 : 해양시 푸른항 진입항로 일원 공유수면</text:p>
      <text:p>다. 면 적 : 5,742㎡</text:p>
      <text:p>라. 준설량 : 14,006㎥</text:p>
      <text:p>마. 목 적 : 항로준설 및 준설토 처리</text:p>
      <text:p>바. 기 간 : 허가일로부터 3개월</text:p>
      <text:p>2. 협의 의견을 2025. 6. 30.까지 회신하여 주시기 바랍니다.  끝.</text:p>
      <text:p>시행 항만개발과-567 (2025. 6. 2.)</text:p>
    </office:text>
  </office:body>
</office:document-content>
</file>
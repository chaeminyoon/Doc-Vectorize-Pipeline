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>해양시청</text:p>
      <text:p>수신 내부결재</text:p>
      <text:p>제목 공유수면 점용·사용 변경허가 검토 보고</text:p>
      <text:p>1. ㈜바다에너지에서 제출한 공유수면 점용·사용 변경허가 신청에 대한 검토 결과를 보고합니다.</text:p>
      <table:table table:name="변경내역">
        <table:table-row>
          <table:table-cell>
            <text:p>구 분</text:p>
          </table:table-cell>
          <table:table-cell>
            <text:p>변경 전</text:p>
          </table:table-cell>
          <table:table-cell>
            <text:p>변경 후</text:p>
          </table:table-cell>
        </table:table-row>
        <table:table-row>
          <table:table-cell>
            <text:p>장 소</text:p>
          </table:table-cell>
          <table:table-cell>
            <text:p>해양시 남빛구 파도동 88번지선 공유수면</text:p>
          </table:table-cell>
          <table:table-cell>
            <text:p>변경 없음</text:p>
          </table:table-cell>
        </table:table-row>
        <table:table-row>
          <table:table-cell>
            <text:p>면 적</text:p>
          </table:table-cell>
          <table:table-cell>
            <text:p>640㎡</text:p>
          </table:table-cell>
          <table:table-cell>
            <text:p>820㎡</text:p>
          </table:table-cell>
        </table:table-row>
        <table:table-row>
          <table:table-cell>
            <text:p>목 적</text:p>
          </table:table-cell>
          <table:table-cell>
            <text:p>해저 송전케이블 설치·운영</text:p>
          </table:table-cell>
          <table:table-cell>
            <text:p>변경 없음</text:p>
          </table:table-cell>
        </table:table-row>
        <table:table-row>
          <table:table-cell>
            <text:p>기 간</text:p>
          </table:table-cell>
          <table:table-cell>
            <text:p>2024. 3. 1. ~ 2026. 2. 28.</text:p>
          </table:table-cell>
          <table:table-cell>
            <text:p>2024. 3. 1. ~ 2027. 2. 28.</text:p>
          </table:table-cell>
        </table:table-row>
      </table:table>
      <text:p>2. 검토 결과 인근 어업권과의 상충이 없어 변경허가가 타당한 것으로 판단됩니다.  끝.</text:p>
      <text:p>기안 2025. 5. 8. 해양항만과</text:p>
    </office:text>
  </office:body>
</office:document-content>
</file>
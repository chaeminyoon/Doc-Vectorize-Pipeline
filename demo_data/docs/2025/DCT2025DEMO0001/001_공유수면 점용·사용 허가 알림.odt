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text>
      <text:p>해양수산부</text:p>
      <text:p>수신 ㈜한빛해양개발 대표이사</text:p>
      <text:p>(경유)</text:p>
      <text:p>제목 공유수면 점용·사용 허가 알림</text:p>
      <text:p>1. 귀사에서 신청한 공유수면 점용·사용 허가 신청에 대하여 「공유수면 관리 및 매립에 관한 법률」 제8조에 따라 아래와 같이 허가하고 알려드립니다.</text:p>
      <text:p>가. 신청인 : ㈜한빛해양개발</text:p>
      <text:p>나. 위 치 : 해양시 푸른구 해돋이동 123-4번지선 공유수면</text:p>
      <text:p>다. 면 적 : 1,250㎡</text:p>
      <text:p>라. 목 적 : 해상관광 부잔교 및 계류시설 설치</text:p>
      <text:p>마. 허가기간 : 2025. 7. 1. ~ 2027. 6. 30.</text:p>
      <text:p>바. 점용료·사용료 : 3,500,000원</text:p>
      <table:table table:name="허가내역">
        <table:table-row>
          <table:table-cell>
            <text:p>신청인</text:p>
          </table:table-cell>
          <table:table-cell>
            <text:p>위 치</text:p>
          </table:table-cell>
          <table:table-cell>
            <text:p>면 적</text:p>
          </table:table-cell>
          <table:table-cell>
            <text:p>목 적</text:p>
          </table:table-cell>
          <table:table-cell>
            <text:p>허가기간</text:p>
          </table:table-cell>
        </table:table-row>
        <table:table-row>
          <table:table-cell>
            <text:p>㈜한빛해양개발</text:p>
          </table:table-cell>
          <table:table-cell>
            <text:p>해양시 푸른구 해돋이동 123-4번지선 공유수면</text:p>
          </table:table-cell>
          <table:table-cell>
            <text:p>1,250㎡</text:p>
          </table:table-cell>
          <table:table-cell>
            <text:p>해상관광 부잔교 및 계류시설 설치</text:p>
          </table:table-cell>
          <table:table-cell>
            <text:p>2025. 7. 1. ~ 2027. 6. 30.</text:p>
          </table:table-cell>
        </table:table-row>
      </table:table>
      <text:p>2. 허가조건을 준수하시기 바라며, 위반 시 허가가 취소될 수 있음을 알려드립니다.  끝.</text:p>
      <text:p>시행 해양항만과-1234 (2025. 6. 12.)</text:p>
    </office:text>
  </office:body>
</office:document-content>
</file>